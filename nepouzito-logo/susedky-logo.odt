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3000000EA19BAE6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  <style:font-face style:name="skolacek CE" svg:font-family="'skolacek CE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ba0d"/>
    </style:style>
    <style:style style:name="T1" style:family="text">
      <style:text-properties style:font-name="skolacek CE" fo:font-size="96pt" officeooo:rsid="001fba0d" style:font-size-asian="96pt" style:font-size-complex="96pt"/>
    </style:style>
    <style:style style:name="T2" style:family="text">
      <style:text-properties style:font-name="skolacek CE" fo:font-size="96pt" officeooo:rsid="00273044" style:font-size-asian="96pt" style:font-size-complex="96pt"/>
    </style:style>
    <style:style style:name="T3" style:family="text">
      <style:text-properties style:font-name="skolacek CE" fo:font-size="150pt" officeooo:rsid="001fba0d" style:font-size-asian="150pt" style:font-size-complex="150pt"/>
    </style:style>
    <style:style style:name="T4" style:family="text">
      <style:text-properties style:font-name="skolacek CE" fo:font-size="150pt" officeooo:rsid="00273044" style:font-size-asian="150pt" style:font-size-complex="150pt"/>
    </style:style>
    <style:style style:name="T5" style:family="text">
      <style:text-properties style:font-name="skolacek CE" fo:font-size="200pt" officeooo:rsid="001fba0d" style:font-size-asian="200pt" style:font-size-complex="200pt"/>
    </style:style>
    <style:style style:name="T6" style:family="text">
      <style:text-properties style:font-name="skolacek CE" fo:font-size="200pt" officeooo:rsid="00273044" style:font-size-asian="200pt" style:font-size-complex="200pt"/>
    </style:style>
    <style:style style:name="T7" style:family="text">
      <style:text-properties style:font-name="skolacek CE" fo:font-size="66pt" officeooo:rsid="001fba0d" style:font-size-asian="57.75pt" style:font-size-complex="66pt"/>
    </style:style>
    <style:style style:name="T8" style:family="text">
      <style:text-properties style:font-name="skolacek CE" fo:font-size="66pt" officeooo:rsid="00273044" style:font-size-asian="57.75pt" style:font-size-complex="66pt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style:font-name="Z003" fo:font-size="200pt" officeooo:rsid="00273044" style:font-size-asian="200pt" style:font-size-complex="200pt"/>
    </style:style>
    <style:style style:name="T11" style:family="text">
      <style:text-properties style:font-name="Z003" fo:font-size="200pt" officeooo:rsid="001fba0d" style:font-size-asian="200pt" style:font-size-complex="200pt"/>
    </style:style>
    <style:style style:name="T12" style:family="text">
      <style:text-properties style:font-name="Z003" fo:font-size="96pt" officeooo:rsid="00273044" style:font-size-asian="96pt" style:font-size-complex="96pt"/>
    </style:style>
    <style:style style:name="T13" style:family="text">
      <style:text-properties style:font-name="Z003" fo:font-size="96pt" officeooo:rsid="001fba0d" style:font-size-asian="96pt" style:font-size-complex="96pt"/>
    </style:style>
    <style:style style:name="T14" style:family="text">
      <style:text-properties style:font-name="DejaVu Serif" fo:font-size="96pt" officeooo:rsid="00273044" style:font-size-asian="96pt" style:font-size-complex="96pt"/>
    </style:style>
    <style:style style:name="T15" style:family="text">
      <style:text-properties style:font-name="DejaVu Serif" fo:font-size="96pt" officeooo:rsid="001fba0d" style:font-size-asian="96pt" style:font-size-complex="9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ázek1" text:anchor-type="char" svg:width="17cm" svg:height="3.443cm" draw:z-index="0"><draw:image xlink:href="Pictures/1000000100000483000000EA19BAE634.png" xlink:type="simple" xlink:show="embed" xlink:actuate="onLoad" draw:mime-type="image/png"/></draw:frame><text:span text:style-name="T1"><text:s/></text:span><text:span text:style-name="T14">s</text:span><text:span text:style-name="T15">úse</text:span><text:span text:style-name="T14">d</text:span><text:span text:style-name="T15">ky</text:span><text:span text:style-name="T5"> </text:span><text:span text:style-name="T7"><text:line-break/>-------- </text:span><text:span text:style-name="T8">pěvecký sbor -------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  <style:font-face style:name="skolacek CE" svg:font-family="'skolacek CE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5:31:58.748224071</meta:creation-date>
    <meta:editing-duration>PT1M10S</meta:editing-duration>
    <meta:editing-cycles>2</meta:editing-cycles>
    <meta:generator>LibreOffice/24.2.7.2$Linux_X86_64 LibreOffice_project/420$Build-2</meta:generator>
    <dc:date>2026-03-30T18:10:39.381562063</dc:date>
    <meta:document-statistic meta:table-count="0" meta:image-count="1" meta:object-count="0" meta:page-count="1" meta:paragraph-count="1" meta:word-count="5" meta:character-count="40" meta:non-whitespace-character-count="34"/>
  </office:meta>
</office:document-meta>
</file>